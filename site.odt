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1pt" style:font-size-asian="9.60000038146973pt" style:font-size-complex="11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1pt" style:font-size-asian="9.60000038146973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!DOCTYPE html&gt;</text:p>
      <text:p text:style-name="P1">&lt;html lang="pt-BR"&gt;</text:p>
      <text:p text:style-name="P1">&lt;head&gt;</text:p>
      <text:p text:style-name="P1"><text:s text:c="2"/>&lt;meta charset="UTF-8"&gt;</text:p>
      <text:p text:style-name="P1"><text:s text:c="2"/>&lt;meta name="viewport" content="width=device-width, initial-scale=1.0"&gt;</text:p>
      <text:p text:style-name="P1"/>
      <text:p text:style-name="P1"><text:s text:c="2"/>&lt;title&gt;Lembrete de Água&lt;/title&gt;</text:p>
      <text:p text:style-name="P1">&lt;img src="capa3.jpg" alt="Imagem do aplicativo"&gt;</text:p>
      <text:p text:style-name="P1"><text:s text:c="2"/>&lt;style&gt;</text:p>
      <text:p text:style-name="P1"/>
      <text:p text:style-name="P1"><text:s text:c="4"/>body{</text:p>
      <text:p text:style-name="P1"><text:s text:c="6"/>font-family: Arial, sans-serif;</text:p>
      <text:p text:style-name="P1"><text:s text:c="6"/>background:#0077ff;</text:p>
      <text:p text:style-name="P1"><text:s text:c="6"/>display:flex;</text:p>
      <text:p text:style-name="P1"><text:s text:c="6"/>justify-content:center;</text:p>
      <text:p text:style-name="P1"><text:s text:c="6"/>align-items:center;</text:p>
      <text:p text:style-name="P1"><text:s text:c="6"/>min-height:100vh;</text:p>
      <text:p text:style-name="P1"><text:s text:c="6"/>margin:0;</text:p>
      <text:p text:style-name="P1"><text:s text:c="6"/>padding:20px;</text:p>
      <text:p text:style-name="P1"><text:s text:c="4"/>}</text:p>
      <text:p text:style-name="P1"/>
      <text:p text:style-name="P1"><text:s text:c="4"/>.container{</text:p>
      <text:p text:style-name="P1"><text:s text:c="6"/>background:white;</text:p>
      <text:p text:style-name="P1"><text:s text:c="6"/>width:420px;</text:p>
      <text:p text:style-name="P1"><text:s text:c="6"/>padding:30px;</text:p>
      <text:p text:style-name="P1"><text:s text:c="6"/>border-radius:20px;</text:p>
      <text:p text:style-name="P1"><text:s text:c="6"/>text-align:center;</text:p>
      <text:p text:style-name="P1"><text:s text:c="6"/>box-shadow:0 0 20px rgba(0,0,0,0.3);</text:p>
      <text:p text:style-name="P1"><text:s text:c="4"/>}</text:p>
      <text:p text:style-name="P1"/>
      <text:p text:style-name="P1"><text:s text:c="4"/>.topo-imagem{</text:p>
      <text:p text:style-name="P1"><text:s text:c="6"/>margin-bottom:20px;</text:p>
      <text:p text:style-name="P1"><text:s text:c="4"/>}</text:p>
      <text:p text:style-name="P1"/>
      <text:p text:style-name="P1"><text:s text:c="4"/>.topo-imagem img{</text:p>
      <text:p text:style-name="P1"><text:s text:c="6"/>width:120px;</text:p>
      <text:p text:style-name="P1"><text:s text:c="6"/>height:120px;</text:p>
      <text:p text:style-name="P1"><text:s text:c="6"/>object-fit:cover;</text:p>
      <text:p text:style-name="P1"><text:soft-page-break/><text:s text:c="6"/>border-radius:50%;</text:p>
      <text:p text:style-name="P1"><text:s text:c="6"/>border:4px solid #0077ff;</text:p>
      <text:p text:style-name="P1"><text:s text:c="4"/>}</text:p>
      <text:p text:style-name="P1"/>
      <text:p text:style-name="P1"><text:s text:c="4"/>h1{</text:p>
      <text:p text:style-name="P1"><text:s text:c="6"/>color:#0077ff;</text:p>
      <text:p text:style-name="P1"><text:s text:c="6"/>margin-bottom:20px;</text:p>
      <text:p text:style-name="P1"><text:s text:c="4"/>}</text:p>
      <text:p text:style-name="P1"/>
      <text:p text:style-name="P1"><text:s text:c="4"/>label{</text:p>
      <text:p text:style-name="P1"><text:s text:c="6"/>display:block;</text:p>
      <text:p text:style-name="P1"><text:s text:c="6"/>text-align:left;</text:p>
      <text:p text:style-name="P1"><text:s text:c="6"/>margin-top:15px;</text:p>
      <text:p text:style-name="P1"><text:s text:c="6"/>font-weight:bold;</text:p>
      <text:p text:style-name="P1"><text:s text:c="6"/>color:#333;</text:p>
      <text:p text:style-name="P1"><text:s text:c="4"/>}</text:p>
      <text:p text:style-name="P1"/>
      <text:p text:style-name="P1"><text:s text:c="4"/>input,</text:p>
      <text:p text:style-name="P1"><text:s text:c="4"/>select{</text:p>
      <text:p text:style-name="P1"><text:s text:c="6"/>width:95%;</text:p>
      <text:p text:style-name="P1"><text:s text:c="6"/>padding:12px;</text:p>
      <text:p text:style-name="P1"><text:s text:c="6"/>margin-top:8px;</text:p>
      <text:p text:style-name="P1"><text:s text:c="6"/>border-radius:10px;</text:p>
      <text:p text:style-name="P1"><text:s text:c="6"/>border:1px solid #ccc;</text:p>
      <text:p text:style-name="P1"><text:s text:c="6"/>font-size:16px;</text:p>
      <text:p text:style-name="P1"><text:s text:c="4"/>}</text:p>
      <text:p text:style-name="P1"/>
      <text:p text:style-name="P1"><text:s text:c="4"/>button{</text:p>
      <text:p text:style-name="P1"><text:s text:c="6"/>background:#0077ff;</text:p>
      <text:p text:style-name="P1"><text:s text:c="6"/>color:white;</text:p>
      <text:p text:style-name="P1"><text:s text:c="6"/>border:none;</text:p>
      <text:p text:style-name="P1"><text:s text:c="6"/>padding:12px 20px;</text:p>
      <text:p text:style-name="P1"><text:s text:c="6"/>border-radius:10px;</text:p>
      <text:p text:style-name="P1"><text:s text:c="6"/>cursor:pointer;</text:p>
      <text:p text:style-name="P1"><text:s text:c="6"/>margin-top:15px;</text:p>
      <text:p text:style-name="P1"><text:s text:c="6"/>font-size:16px;</text:p>
      <text:p text:style-name="P1"><text:s text:c="6"/>transition:0.3s;</text:p>
      <text:p text:style-name="P1"><text:s text:c="4"/>}</text:p>
      <text:p text:style-name="P1"><text:soft-page-break/></text:p>
      <text:p text:style-name="P1"><text:s text:c="4"/>button:hover{</text:p>
      <text:p text:style-name="P1"><text:s text:c="6"/>background:#005fcc;</text:p>
      <text:p text:style-name="P1"><text:s text:c="4"/>}</text:p>
      <text:p text:style-name="P1"/>
      <text:p text:style-name="P1"><text:s text:c="4"/>.resultado{</text:p>
      <text:p text:style-name="P1"><text:s text:c="6"/>margin-top:20px;</text:p>
      <text:p text:style-name="P1"><text:s text:c="6"/>font-size:20px;</text:p>
      <text:p text:style-name="P1"><text:s text:c="6"/>color:#333;</text:p>
      <text:p text:style-name="P1"><text:s text:c="6"/>font-weight:bold;</text:p>
      <text:p text:style-name="P1"><text:s text:c="4"/>}</text:p>
      <text:p text:style-name="P1"/>
      <text:p text:style-name="P1"><text:s text:c="4"/>.barra{</text:p>
      <text:p text:style-name="P1"><text:s text:c="6"/>width:100%;</text:p>
      <text:p text:style-name="P1"><text:s text:c="6"/>height:30px;</text:p>
      <text:p text:style-name="P1"><text:s text:c="6"/>background:#ddd;</text:p>
      <text:p text:style-name="P1"><text:s text:c="6"/>border-radius:20px;</text:p>
      <text:p text:style-name="P1"><text:s text:c="6"/>overflow:hidden;</text:p>
      <text:p text:style-name="P1"><text:s text:c="6"/>margin-top:20px;</text:p>
      <text:p text:style-name="P1"><text:s text:c="4"/>}</text:p>
      <text:p text:style-name="P1"/>
      <text:p text:style-name="P1"><text:s text:c="4"/>.progresso{</text:p>
      <text:p text:style-name="P1"><text:s text:c="6"/>height:100%;</text:p>
      <text:p text:style-name="P1"><text:s text:c="6"/>width:0%;</text:p>
      <text:p text:style-name="P1"><text:s text:c="6"/>background:linear-gradient(90deg,#00c6ff,#0072ff);</text:p>
      <text:p text:style-name="P1"><text:s text:c="6"/>transition:0.5s;</text:p>
      <text:p text:style-name="P1"><text:s text:c="6"/>text-align:center;</text:p>
      <text:p text:style-name="P1"><text:s text:c="6"/>color:white;</text:p>
      <text:p text:style-name="P1"><text:s text:c="6"/>font-weight:bold;</text:p>
      <text:p text:style-name="P1"><text:s text:c="6"/>line-height:30px;</text:p>
      <text:p text:style-name="P1"><text:s text:c="4"/>}</text:p>
      <text:p text:style-name="P1"/>
      <text:p text:style-name="P1"><text:s text:c="4"/>.copos{</text:p>
      <text:p text:style-name="P1"><text:s text:c="6"/>margin-top:15px;</text:p>
      <text:p text:style-name="P1"><text:s text:c="6"/>font-size:20px;</text:p>
      <text:p text:style-name="P1"><text:s text:c="6"/>color:#333;</text:p>
      <text:p text:style-name="P1"><text:s text:c="4"/>}</text:p>
      <text:p text:style-name="P1"/>
      <text:p text:style-name="P1"><text:soft-page-break/><text:s text:c="4"/>.motivacao{</text:p>
      <text:p text:style-name="P1"><text:s text:c="6"/>margin-top:20px;</text:p>
      <text:p text:style-name="P1"><text:s text:c="6"/>font-size:18px;</text:p>
      <text:p text:style-name="P1"><text:s text:c="6"/>color:#0077ff;</text:p>
      <text:p text:style-name="P1"><text:s text:c="6"/>font-weight:bold;</text:p>
      <text:p text:style-name="P1"><text:s text:c="4"/>}</text:p>
      <text:p text:style-name="P1"/>
      <text:p text:style-name="P1"><text:s text:c="4"/>.dicas,</text:p>
      <text:p text:style-name="P1"><text:s text:c="4"/>.importancia{</text:p>
      <text:p text:style-name="P1"><text:s text:c="6"/>margin-top:20px;</text:p>
      <text:p text:style-name="P1"><text:s text:c="6"/>text-align:left;</text:p>
      <text:p text:style-name="P1"><text:s text:c="6"/>background:#f5f9ff;</text:p>
      <text:p text:style-name="P1"><text:s text:c="6"/>padding:15px;</text:p>
      <text:p text:style-name="P1"><text:s text:c="6"/>border-radius:15px;</text:p>
      <text:p text:style-name="P1"><text:s text:c="4"/>}</text:p>
      <text:p text:style-name="P1"/>
      <text:p text:style-name="P1"><text:s text:c="4"/>.dicas h3,</text:p>
      <text:p text:style-name="P1"><text:s text:c="4"/>.importancia h3{</text:p>
      <text:p text:style-name="P1"><text:s text:c="6"/>color:#0077ff;</text:p>
      <text:p text:style-name="P1"><text:s text:c="6"/>margin-top:0;</text:p>
      <text:p text:style-name="P1"><text:s text:c="4"/>}</text:p>
      <text:p text:style-name="P1"/>
      <text:p text:style-name="P1"><text:s text:c="4"/>ul{</text:p>
      <text:p text:style-name="P1"><text:s text:c="6"/>padding-left:20px;</text:p>
      <text:p text:style-name="P1"><text:s text:c="4"/>}</text:p>
      <text:p text:style-name="P1"/>
      <text:p text:style-name="P1"><text:s text:c="4"/>li{</text:p>
      <text:p text:style-name="P1"><text:s text:c="6"/>margin-bottom:8px;</text:p>
      <text:p text:style-name="P1"><text:s text:c="4"/>}</text:p>
      <text:p text:style-name="P1"/>
      <text:p text:style-name="P1"><text:s text:c="2"/>&lt;/style&gt;</text:p>
      <text:p text:style-name="P1">&lt;/head&gt;</text:p>
      <text:p text:style-name="P1">&lt;body&gt;</text:p>
      <text:p text:style-name="P1"/>
      <text:p text:style-name="P1"/>
      <text:p text:style-name="P1"><text:s text:c="2"/>&lt;/div&gt;</text:p>
      <text:p text:style-name="P1"/>
      <text:p text:style-name="P1"><text:s text:c="2"/>&lt;h2&gt;💧 Lembrete de Água&lt;/h2&gt;</text:p>
      <text:p text:style-name="P1"><text:soft-page-break/></text:p>
      <text:p text:style-name="P1"><text:s text:c="2"/>&lt;!-- DICAS --&gt;</text:p>
      <text:p text:style-name="P1"/>
      <text:p text:style-name="P1"><text:s text:c="2"/>&lt;div class="dicas"&gt;</text:p>
      <text:p text:style-name="P1"/>
      <text:p text:style-name="P1"><text:s text:c="3"/>&lt;h2&gt; 🍃Dicas para beber mais água&lt;/h2&gt;</text:p>
      <text:p text:style-name="P1"/>
      <text:p text:style-name="P1"><text:s text:c="4"/>&lt;ul&gt;</text:p>
      <text:p text:style-name="P1"><text:s text:c="6"/>&lt;li&gt;Leve uma garrafinha para todos os lugares&lt;/li&gt;</text:p>
      <text:p text:style-name="P1"><text:s text:c="6"/>&lt;li&gt;Beba água logo ao acordar&lt;/li&gt;</text:p>
      <text:p text:style-name="P1"><text:s text:c="6"/>&lt;li&gt;Use alarmes durante o dia&lt;/li&gt;</text:p>
      <text:p text:style-name="P1"><text:s text:c="6"/>&lt;li&gt;Adicione limão ou hortelã para dar sabor&lt;/li&gt;</text:p>
      <text:p text:style-name="P1"><text:s text:c="6"/>&lt;li&gt;Beba água antes das refeições&lt;/li&gt;</text:p>
      <text:p text:style-name="P1"><text:s text:c="4"/>&lt;/ul&gt;</text:p>
      <text:p text:style-name="P1"/>
      <text:p text:style-name="P1"><text:s text:c="2"/>&lt;/div&gt;</text:p>
      <text:p text:style-name="P1"/>
      <text:p text:style-name="P1"><text:s text:c="2"/>&lt;!-- IMPORTÂNCIA --&gt;</text:p>
      <text:p text:style-name="P1"/>
      <text:p text:style-name="P1"><text:s text:c="2"/>&lt;div class="importancia"&gt;</text:p>
      <text:p text:style-name="P1"/>
      <text:p text:style-name="P1"><text:s text:c="4"/>&lt;h3&gt;🌍 Importância da Água&lt;/h3&gt;</text:p>
      <text:p text:style-name="P1"/>
      <text:p text:style-name="P1"><text:s text:c="4"/>&lt;p&gt;</text:p>
      <text:p text:style-name="P1"><text:s text:c="6"/>A água ajuda no funcionamento do corpo,</text:p>
      <text:p text:style-name="P1"><text:s text:c="6"/>melhora a pele, evita dores de cabeça,</text:p>
      <text:p text:style-name="P1"><text:s text:c="6"/>aumenta a energia e melhora a concentração.</text:p>
      <text:p text:style-name="P1"><text:s text:c="4"/>&lt;/p&gt;</text:p>
      <text:p text:style-name="P1"/>
      <text:p text:style-name="P1"><text:s text:c="2"/>&lt;/div&gt;</text:p>
      <text:p text:style-name="P1"/>
      <text:p text:style-name="P1"><text:s text:c="2"/>&lt;!-- PESO --&gt;</text:p>
      <text:p text:style-name="P1"/>
      <text:p text:style-name="P1"><text:s text:c="2"/>&lt;label for="peso"&gt;</text:p>
      <text:p text:style-name="P1"><text:s text:c="4"/>Digite seu peso</text:p>
      <text:p text:style-name="P1"><text:s text:c="2"/>&lt;/label&gt;</text:p>
      <text:p text:style-name="P1"/>
      <text:p text:style-name="P1"><text:s text:c="2"/>&lt;input</text:p>
      <text:p text:style-name="P1"><text:soft-page-break/><text:s text:c="4"/>type="number"</text:p>
      <text:p text:style-name="P1"><text:s text:c="4"/>id="peso"</text:p>
      <text:p text:style-name="P1"><text:s text:c="4"/>placeholder="Ex: 70"&gt;</text:p>
      <text:p text:style-name="P1"/>
      <text:p text:style-name="P1"><text:s text:c="2"/>&lt;label for="unidade"&gt;</text:p>
      <text:p text:style-name="P1"><text:s text:c="4"/>Escolha a unidade do peso</text:p>
      <text:p text:style-name="P1"><text:s text:c="2"/>&lt;/label&gt;</text:p>
      <text:p text:style-name="P1"/>
      <text:p text:style-name="P1"><text:s text:c="2"/>&lt;select id="unidade"&gt;</text:p>
      <text:p text:style-name="P1"/>
      <text:p text:style-name="P1"><text:s text:c="4"/>&lt;option value="kg"&gt;</text:p>
      <text:p text:style-name="P1"><text:s text:c="6"/>Quilogramas (kg)</text:p>
      <text:p text:style-name="P1"><text:s text:c="4"/>&lt;/option&gt;</text:p>
      <text:p text:style-name="P1"/>
      <text:p text:style-name="P1"><text:s text:c="4"/>&lt;option value="lb"&gt;</text:p>
      <text:p text:style-name="P1"><text:s text:c="6"/>Libras (lb)</text:p>
      <text:p text:style-name="P1"><text:s text:c="4"/>&lt;/option&gt;</text:p>
      <text:p text:style-name="P1"/>
      <text:p text:style-name="P1"><text:s text:c="2"/>&lt;/select&gt;</text:p>
      <text:p text:style-name="P1"/>
      <text:p text:style-name="P1"><text:s text:c="2"/>&lt;button onclick="calcularAgua()"&gt;</text:p>
      <text:p text:style-name="P1"/>
      <text:p text:style-name="P1"><text:s text:c="4"/>Calcular Meta 💧</text:p>
      <text:p text:style-name="P1"/>
      <text:p text:style-name="P1"><text:s text:c="2"/>&lt;/button&gt;</text:p>
      <text:p text:style-name="P1"/>
      <text:p text:style-name="P1"><text:s text:c="2"/>&lt;div class="resultado" id="resultado"&gt;&lt;/div&gt;</text:p>
      <text:p text:style-name="P1"/>
      <text:p text:style-name="P1"><text:s text:c="2"/>&lt;!-- BARRA --&gt;</text:p>
      <text:p text:style-name="P1"/>
      <text:p text:style-name="P1"><text:s text:c="2"/>&lt;div class="barra"&gt;</text:p>
      <text:p text:style-name="P1"/>
      <text:p text:style-name="P1"><text:s text:c="4"/>&lt;div class="progresso" id="progresso"&gt;</text:p>
      <text:p text:style-name="P1"/>
      <text:p text:style-name="P1"><text:s text:c="6"/>0%</text:p>
      <text:p text:style-name="P1"/>
      <text:p text:style-name="P1"><text:s text:c="4"/>&lt;/div&gt;</text:p>
      <text:p text:style-name="P1"/>
      <text:p text:style-name="P1"><text:soft-page-break/><text:s text:c="2"/>&lt;/div&gt;</text:p>
      <text:p text:style-name="P1"/>
      <text:p text:style-name="P1"><text:s text:c="2"/>&lt;!-- CONTADOR --&gt;</text:p>
      <text:p text:style-name="P1"/>
      <text:p text:style-name="P1"><text:s text:c="2"/>&lt;div class="copos"&gt;</text:p>
      <text:p text:style-name="P1"><text:s text:c="4"/>🥤 Copos tomados:</text:p>
      <text:p text:style-name="P1"><text:s text:c="4"/>&lt;span id="copos"&gt;0&lt;/span&gt;</text:p>
      <text:p text:style-name="P1"><text:s text:c="2"/>&lt;/div&gt;</text:p>
      <text:p text:style-name="P1"/>
      <text:p text:style-name="P1"><text:s text:c="2"/>&lt;div class="copos"&gt;</text:p>
      <text:p text:style-name="P1"><text:s text:c="4"/>💧 Água bebida:</text:p>
      <text:p text:style-name="P1"><text:s text:c="4"/>&lt;span id="agua"&gt;0&lt;/span&gt; ml</text:p>
      <text:p text:style-name="P1"><text:s text:c="2"/>&lt;/div&gt;</text:p>
      <text:p text:style-name="P1"/>
      <text:p text:style-name="P1"><text:s text:c="2"/>&lt;button onclick="beberAgua()"&gt;</text:p>
      <text:p text:style-name="P1"/>
      <text:p text:style-name="P1"><text:s text:c="4"/>+200ml 💧</text:p>
      <text:p text:style-name="P1"/>
      <text:p text:style-name="P1"><text:s text:c="2"/>&lt;/button&gt;</text:p>
      <text:p text:style-name="P1"/>
      <text:p text:style-name="P1"><text:s text:c="2"/>&lt;!-- MOTIVAÇÃO --&gt;</text:p>
      <text:p text:style-name="P1"/>
      <text:p text:style-name="P1"><text:s text:c="2"/>&lt;div class="motivacao" id="motivacao"&gt;&lt;/div&gt;</text:p>
      <text:p text:style-name="P1"/>
      <text:p text:style-name="P1">&lt;/div&gt;</text:p>
      <text:p text:style-name="P1"/>
      <text:p text:style-name="P1">&lt;script&gt;</text:p>
      <text:p text:style-name="P1"/>
      <text:p text:style-name="P1">let metaAgua = 0;</text:p>
      <text:p text:style-name="P1">let aguaTomada = 0;</text:p>
      <text:p text:style-name="P1">let copos = 0;</text:p>
      <text:p text:style-name="P1"/>
      <text:p text:style-name="P1">// CALCULAR META</text:p>
      <text:p text:style-name="P1"/>
      <text:p text:style-name="P1">function calcularAgua(){</text:p>
      <text:p text:style-name="P1"/>
      <text:p text:style-name="P1"><text:s text:c="2"/>let peso =</text:p>
      <text:p text:style-name="P1"><text:s text:c="4"/>parseFloat(document.getElementById("peso").value);</text:p>
      <text:p text:style-name="P1"><text:soft-page-break/></text:p>
      <text:p text:style-name="P1"><text:s text:c="2"/>const unidade =</text:p>
      <text:p text:style-name="P1"><text:s text:c="4"/>document.getElementById("unidade").value;</text:p>
      <text:p text:style-name="P1"/>
      <text:p text:style-name="P1"><text:s text:c="2"/>if(isNaN(peso)){</text:p>
      <text:p text:style-name="P1"/>
      <text:p text:style-name="P1"><text:s text:c="4"/>alert("Digite seu peso!");</text:p>
      <text:p text:style-name="P1"><text:s text:c="4"/>return;</text:p>
      <text:p text:style-name="P1"><text:s text:c="2"/>}</text:p>
      <text:p text:style-name="P1"/>
      <text:p text:style-name="P1"><text:s text:c="2"/>// CONVERTER LIBRAS PARA KG</text:p>
      <text:p text:style-name="P1"/>
      <text:p text:style-name="P1"><text:s text:c="2"/>if(unidade === "lb"){</text:p>
      <text:p text:style-name="P1"/>
      <text:p text:style-name="P1"><text:s text:c="4"/>peso = peso * 0.453592;</text:p>
      <text:p text:style-name="P1"><text:s text:c="2"/>}</text:p>
      <text:p text:style-name="P1"/>
      <text:p text:style-name="P1"><text:s text:c="2"/>metaAgua = Math.floor(peso * 35);</text:p>
      <text:p text:style-name="P1"/>
      <text:p text:style-name="P1"><text:s text:c="2"/>document.getElementById("resultado").innerHTML =</text:p>
      <text:p text:style-name="P1"><text:s text:c="4"/>`Meta diária: ${metaAgua} ml`;</text:p>
      <text:p text:style-name="P1"/>
      <text:p text:style-name="P1">}</text:p>
      <text:p text:style-name="P1"/>
      <text:p text:style-name="P1">// ADICIONAR ÁGUA</text:p>
      <text:p text:style-name="P1"/>
      <text:p text:style-name="P1">function beberAgua(){</text:p>
      <text:p text:style-name="P1"/>
      <text:p text:style-name="P1"><text:s text:c="2"/>if(metaAgua === 0){</text:p>
      <text:p text:style-name="P1"/>
      <text:p text:style-name="P1"><text:s text:c="4"/>alert("Calcule sua meta primeiro!");</text:p>
      <text:p text:style-name="P1"><text:s text:c="4"/>return;</text:p>
      <text:p text:style-name="P1"><text:s text:c="2"/>}</text:p>
      <text:p text:style-name="P1"/>
      <text:p text:style-name="P1"><text:s text:c="2"/>aguaTomada += 200;</text:p>
      <text:p text:style-name="P1"><text:s text:c="2"/>copos++;</text:p>
      <text:p text:style-name="P1"/>
      <text:p text:style-name="P1"><text:s text:c="2"/>document.getElementById("copos").innerText =</text:p>
      <text:p text:style-name="P1"><text:soft-page-break/><text:s text:c="4"/>copos;</text:p>
      <text:p text:style-name="P1"/>
      <text:p text:style-name="P1"><text:s text:c="2"/>document.getElementById("agua").innerText =</text:p>
      <text:p text:style-name="P1"><text:s text:c="4"/>aguaTomada;</text:p>
      <text:p text:style-name="P1"/>
      <text:p text:style-name="P1"><text:s text:c="2"/>let porcentagem =</text:p>
      <text:p text:style-name="P1"><text:s text:c="4"/>(aguaTomada / metaAgua) * 100;</text:p>
      <text:p text:style-name="P1"/>
      <text:p text:style-name="P1"><text:s text:c="2"/>if(porcentagem &gt; 100){</text:p>
      <text:p text:style-name="P1"/>
      <text:p text:style-name="P1"><text:s text:c="4"/>porcentagem = 100;</text:p>
      <text:p text:style-name="P1"><text:s text:c="2"/>}</text:p>
      <text:p text:style-name="P1"/>
      <text:p text:style-name="P1"><text:s text:c="2"/>document.getElementById("progresso").style.width =</text:p>
      <text:p text:style-name="P1"><text:s text:c="4"/>porcentagem + "%";</text:p>
      <text:p text:style-name="P1"/>
      <text:p text:style-name="P1"><text:s text:c="2"/>document.getElementById("progresso").innerText =</text:p>
      <text:p text:style-name="P1"><text:s text:c="4"/>Math.floor(porcentagem) + "%";</text:p>
      <text:p text:style-name="P1"/>
      <text:p text:style-name="P1"><text:s text:c="2"/>// MOTIVAÇÃO</text:p>
      <text:p text:style-name="P1"/>
      <text:p text:style-name="P1"><text:s text:c="2"/>if(porcentagem &gt;= 100){</text:p>
      <text:p text:style-name="P1"/>
      <text:p text:style-name="P1"><text:s text:c="4"/>document.getElementById("motivacao").innerHTML =</text:p>
      <text:p text:style-name="P1"><text:s text:c="6"/>"🎉 Parabéns! Você atingiu sua meta diária!";</text:p>
      <text:p text:style-name="P1"/>
      <text:p text:style-name="P1"><text:s text:c="2"/>}</text:p>
      <text:p text:style-name="P1"/>
      <text:p text:style-name="P1"><text:s text:c="2"/>else if(porcentagem &gt;= 50){</text:p>
      <text:p text:style-name="P1"/>
      <text:p text:style-name="P1"><text:s text:c="4"/>document.getElementById("motivacao").innerHTML =</text:p>
      <text:p text:style-name="P1"><text:s text:c="6"/>"🔥 Você já está na metade da meta!";</text:p>
      <text:p text:style-name="P1"/>
      <text:p text:style-name="P1"><text:s text:c="2"/>}</text:p>
      <text:p text:style-name="P1"/>
      <text:p text:style-name="P1"><text:s text:c="2"/>else{</text:p>
      <text:p text:style-name="P1"/>
      <text:p text:style-name="P1"><text:s text:c="4"/>document.getElementById("motivacao").innerHTML =</text:p>
      <text:p text:style-name="P1"><text:soft-page-break/><text:s text:c="6"/>"💪 Continue bebendo água!";</text:p>
      <text:p text:style-name="P1"><text:s text:c="2"/>}</text:p>
      <text:p text:style-name="P1"/>
      <text:p text:style-name="P1">}</text:p>
      <text:p text:style-name="P1"/>
      <text:p text:style-name="P1">// NOTIFICAÇÕES</text:p>
      <text:p text:style-name="P1"/>
      <text:p text:style-name="P1">if(Notification.permission !== "granted"){</text:p>
      <text:p text:style-name="P1"/>
      <text:p text:style-name="P1"><text:s text:c="2"/>Notification.requestPermission();</text:p>
      <text:p text:style-name="P1">}</text:p>
      <text:p text:style-name="P1"/>
      <text:p text:style-name="P1">setInterval(() =&gt; {</text:p>
      <text:p text:style-name="P1"/>
      <text:p text:style-name="P1"><text:s text:c="2"/>if(Notification.permission === "granted"){</text:p>
      <text:p text:style-name="P1"/>
      <text:p text:style-name="P1"><text:s text:c="4"/>new Notification(</text:p>
      <text:p text:style-name="P1"><text:s text:c="6"/>"💧 Hora de beber água!"</text:p>
      <text:p text:style-name="P1"><text:s text:c="4"/>);</text:p>
      <text:p text:style-name="P1"><text:s text:c="2"/>}</text:p>
      <text:p text:style-name="P1"/>
      <text:p text:style-name="P1">}, 3600000);</text:p>
      <text:p text:style-name="P1"/>
      <text:p text:style-name="P1">&lt;/script&gt;</text:p>
      <text:p text:style-name="P1"/>
      <text:p text:style-name="P1">&lt;/body&gt;</text:p>
      <text:p text:style-name="P1">&lt;/html&gt; <text:s text:c="3"/>esta certo?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13T08:31:32.898000000</meta:creation-date>
    <dc:title>Documento modelo</dc:title>
    <meta:editing-duration>PT58S</meta:editing-duration>
    <meta:editing-cycles>2</meta:editing-cycles>
    <meta:generator>LibreOffice/7.5.1.2$Windows_X86_64 LibreOffice_project/fcbaee479e84c6cd81291587d2ee68cba099e129</meta:generator>
    <dc:date>2026-05-13T08:32:20.610000000</dc:date>
    <meta:document-statistic meta:table-count="0" meta:image-count="0" meta:object-count="0" meta:page-count="10" meta:paragraph-count="264" meta:word-count="501" meta:character-count="5458" meta:non-whitespace-character-count="4216"/>
    <meta:template xlink:type="simple" xlink:actuate="onRequest" xlink:title="Documento modelo" xlink:href="file:///C:/Users/SEEMG/AppData/Roaming/LibreOffice/4/user/template/Documento%20modelo.ott" meta:date="2026-05-13T08:31:27.111000000"/>
  </office:meta>
</office:document-meta>
</file>